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text-properties fo:font-weight="bold" style:font-weight-asian="bold" fo:font-size="14pt" style:font-size-asian="14pt" style:font-size-complex="14pt"/>
    </style:style>
    <style:style style:name="P4" style:parent-style-name="Normal" style:family="paragraph">
      <style:text-properties fo:font-weight="bold" style:font-weight-asian="bold"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style>
  </office:automatic-styles>
  <office:body>
    <office:text text:use-soft-page-breaks="true">
      <text:p text:style-name="P1">Introduction<text:s/></text:p>
      <text:p text:style-name="Normal">For this portfolio task we’ve been put into groups of 4, as the group we decided that we will be creating a game called Buggy Run using 3DS Max modelling studio and three.js JavaScript platform.</text:p>
      <text:p text:style-name="Normal">Buggy Run will be an outdoor racing arena game, where the user has to control a vehicle to collect multiple rings, each ring that is collected adds a point to the number of rings collected. There will be a timer that is initialised when the play button is pressed. Once all rings are collected, the game finishes and the time will stop. The quicker the rings are collected the lower the overall time will be.<text:s/></text:p>
      <text:p text:style-name="P2">Description<text:s/></text:p>
      <text:p text:style-name="P3">Key Features</text:p>
      <text:p text:style-name="P4">Target Audience<text:s/></text:p>
      <text:p text:style-name="Normal"><text:span text:style-name="T5">Concept A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tie</meta:initial-creator>
    <dc:creator>katie</dc:creator>
    <meta:creation-date>2015-02-12T16:10:00Z</meta:creation-date>
    <dc:date>2015-02-26T14:24:00Z</dc:date>
    <meta:template xlink:href="Normal" xlink:type="simple"/>
    <meta:editing-cycles>5</meta:editing-cycles>
    <meta:editing-duration>PT1680S</meta:editing-duration>
    <meta:document-statistic meta:page-count="1" meta:paragraph-count="1" meta:word-count="100" meta:character-count="673" meta:row-count="4" meta:non-whitespace-character-count="574"/>
  </office:meta>
</office:document-meta>
</file>